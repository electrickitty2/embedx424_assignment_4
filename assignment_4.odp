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9000001A077AE4F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to try...</text:p>
          </draw:text-box>
        </draw:frame>
        <draw:frame draw:style-name="gr2" draw:text-style-name="P2" draw:layer="layout" svg:width="19.71cm" svg:height="11.006cm" svg:x="4.196cm" svg:y="3.599cm">
          <draw:image xlink:href="Pictures/10000001000002E9000001A077AE4F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9:36:13.261907879</meta:creation-date>
    <dc:date>2026-05-21T19:41:54.366056598</dc:date>
    <meta:editing-duration>PT5M45S</meta:editing-duration>
    <meta:editing-cycles>1</meta:editing-cycles>
    <meta:document-statistic meta:object-count="29"/>
    <meta:generator>LibreOffice/24.2.7.2$Linux_X86_64 LibreOffice_project/420$Build-2</meta:generator>
  </office:meta>
</office:document-meta>
</file>