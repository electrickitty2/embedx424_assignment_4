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B00000037CC15B4D09.png" manifest:media-type="image/png"/>
  <manifest:file-entry manifest:full-path="Pictures/10000001000004C90000022C62E31792.png" manifest:media-type="image/png"/>
  <manifest:file-entry manifest:full-path="Pictures/10000001000002CB0000020E0337EE47.png" manifest:media-type="image/png"/>
  <manifest:file-entry manifest:full-path="Pictures/10000001000004B40000021CB8BBBCD2.png" manifest:media-type="image/png"/>
  <manifest:file-entry manifest:full-path="Pictures/10000001000002D100000232C172ED0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M Mono 12" svg:font-family="'LM Mono 12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3.311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42cm" fo:margin-bottom="0.35cm" fo:line-height="100%" fo:text-align="center" fo:text-indent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5cm" fo:margin-bottom="0cm" fo:text-align="start"/>
    </style:style>
    <style:style style:name="P7" style:family="paragraph">
      <style:paragraph-properties fo:margin-top="0.5cm" fo:margin-bottom="0cm"/>
    </style:style>
    <style:style style:name="P8" style:family="paragraph">
      <style:paragraph-properties fo:text-align="star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36pt" style:font-size-complex="36pt"/>
    </style:style>
    <style:style style:name="T3" style:family="text">
      <style:text-properties style:text-position="0% 100%" fo:font-size="32pt" style:font-size-asian="32pt" style:font-size-complex="32pt"/>
    </style:style>
    <style:style style:name="T4" style:family="text">
      <style:text-properties style:text-position="0% 100%" fo:font-size="24pt" style:font-size-asian="24pt" style:font-size-complex="24pt"/>
    </style:style>
    <style:style style:name="T5" style:family="text">
      <style:text-properties fo:font-size="42pt" fo:font-weight="bold" style:font-size-asian="42pt" style:font-weight-asian="bold" style:font-size-complex="42pt" style:font-weight-complex="bold"/>
    </style:style>
    <style:style style:name="T6" style:family="text">
      <style:text-properties style:font-name="LM Mono 12" fo:font-size="14pt" style:font-size-asian="14pt" style:font-size-complex="14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M Mono 12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1"><text:span text:style-name="T1">Embedded AI – Assignment 4</text:span></text:p>
            <text:p text:style-name="P1"><text:span text:style-name="T2">EMBD X424</text:span></text:p>
            <text:p text:style-name="P1"><text:span text:style-name="T3">Dennis Griffith</text:span></text:p>
            <text:p text:style-name="P1"><text:span text:style-name="T3"/></text:p>
            <text:p text:style-name="P1"><text:span text:style-name="T4">https://github.com/electrickitty2/embedx424_assignment_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311cm" svg:x="1.4cm" svg:y="0.287cm" presentation:class="title" presentation:user-transformed="true">
          <draw:text-box>
            <text:p text:style-name="P3"><text:span text:style-name="T5">Garbage Classification Tiny CNN — All TFLite Quantization Option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ownload or load a dataset</text:p>
              </text:list-item>
              <text:list-item>
                <text:p>Train a tiny grayscale CNN classifier</text:p>
              </text:list-item>
              <text:list-item>
                <text:p>Export all five TFLite quantization variants:</text:p>
                <text:list>
                  <text:list-item>
                    <text:p>Float32</text:p>
                  </text:list-item>
                  <text:list-item>
                    <text:p>Dynamic-range Quantization</text:p>
                  </text:list-item>
                  <text:list-item>
                    <text:p>Float16</text:p>
                  </text:list-item>
                  <text:list-item>
                    <text:p>Full int8, float I/O</text:p>
                  </text:list-item>
                  <text:list-item>
                    <text:p>Full int8 strict int8 I/O</text:p>
                  </text:list-item>
                </text:list>
              </text:list-item>
              <text:list-item>
                <text:p>Sanity-check every exported model on desktop with tf.lite.interpret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Defini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aseline – Just add the export for all of the different models before changing any parameters </text:p>
              </text:list-item>
              <text:list-item>
                <text:p>Final – This is the model with some tweaks to make it more accurate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Changes made to make Baselin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dded Export of various model quantization</text:p>
              </text:list-item>
              <text:list-item>
                <text:p>Added Accuracy and Loss graphs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Baseline Model</text:p>
          </draw:text-box>
        </draw:frame>
        <draw:frame draw:style-name="gr2" draw:text-style-name="P5" draw:layer="layout" svg:width="15.804cm" svg:height="12.319cm" svg:x="6.421cm" svg:y="3.431cm">
          <draw:image xlink:href="Pictures/10000001000002D100000232C172ED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Baseline results</text:p>
          </draw:text-box>
        </draw:frame>
        <draw:frame presentation:style-name="pr4" draw:layer="layout" svg:width="25.199cm" svg:height="11.555cm" svg:x="1.4cm" svg:y="3.685cm" presentation:class="outline" presentation:user-transformed="true">
          <draw:text-box>
            <text:p><text:span text:style-name="T6">Ground truth: cardboard</text:span></text:p>
            <text:p text:style-name="P6"><text:span text:style-name="T7">Model <text:s text:c="17"/>In dtype <text:s text:c="4"/>Out dtype <text:s text:c="3"/>Pred <text:s text:c="8"/>Conf <text:s text:c="8"/>Size</text:span><text:span text:style-name="T6"> <text:s text:c="5"/>Runs</text:span></text:p>
            <text:p><text:span text:style-name="T6">------------------------------------------------------------------------------------------</text:span></text:p>
            <text:p><text:span text:style-name="T6">1 float32 <text:s text:c="13"/>float32 <text:s text:c="5"/>float32 <text:s text:c="5"/>cardboard <text:s text:c="3"/>40.5% ✓ <text:s text:c="5"/>16K <text:s text:c="7"/>No</text:span></text:p>
            <text:p text:style-name="P7"><text:span text:style-name="T7">2 dynamic-range <text:s text:c="7"/>float32 <text:s text:c="5"/>float32 <text:s text:c="5"/>cardboard <text:s text:c="3"/>40.5% ✓ <text:s text:c="5"/>16K</text:span><text:span text:style-name="T6"> <text:s text:c="7"/>No</text:span></text:p>
            <text:p text:style-name="P7"><text:span text:style-name="T7">3 float16 <text:s text:c="13"/>float32 <text:s text:c="5"/>float32 <text:s text:c="5"/>cardboard <text:s text:c="3"/>40.5% ✓ <text:s text:c="5"/>12K</text:span><text:span text:style-name="T6"> <text:s text:c="7"/>No</text:span></text:p>
            <text:p text:style-name="P7"><text:span text:style-name="T7">4 int8 float I/O <text:s text:c="6"/>float32 <text:s text:c="5"/>float32 <text:s text:c="5"/>cardboard <text:s text:c="3"/>41.0% ✓ <text:s text:c="5"/>12K</text:span><text:span text:style-name="T6"> <text:s text:c="7"/>No</text:span></text:p>
            <text:p text:style-name="P7"><text:span text:style-name="T7">5 int8 strict I/O <text:s text:c="5"/>int8 <text:s text:c="8"/>int8 <text:s text:c="8"/>cardboard <text:s text:c="3"/>41.0% ✓ <text:s text:c="5"/>12K</text:span><text:span text:style-name="T6"> <text:s text:c="7"/>No</text:span>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Baseline training vs validation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5" draw:layer="layout" svg:width="27.999cm" svg:height="12.557cm" svg:x="0.001cm" svg:y="3.193cm">
          <draw:image xlink:href="Pictures/10000001000004B40000021CB8BBBC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Changes made to make Baselin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dded Export of various model quantization</text:p>
              </text:list-item>
              <text:list-item>
                <text:p>Added Accuracy and Loss graphs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Final Model</text:p>
          </draw:text-box>
        </draw:frame>
        <draw:frame draw:style-name="gr2" draw:text-style-name="P5" draw:layer="layout" svg:width="16.36cm" svg:height="12.035cm" svg:x="4.595cm" svg:y="3.588cm">
          <draw:image xlink:href="Pictures/10000001000002CB0000020E0337EE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Final Results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p text:style-name="P6"><text:span text:style-name="T6">Ground truth: cardboard</text:span></text:p>
            <text:p text:style-name="P6"><text:span text:style-name="T6">Model <text:s text:c="17"/>In dtype <text:s text:c="4"/>Out dtype <text:s text:c="3"/>Pred <text:s text:c="8"/>Conf <text:s text:c="8"/>Size <text:s text:c="5"/>Runs</text:span></text:p>
            <text:p text:style-name="P6"><text:span text:style-name="T6">------------------------------------------------------------------------------------------</text:span></text:p>
            <text:p text:style-name="P6"><text:span text:style-name="T6">1 float32 <text:s text:c="13"/>float32 <text:s text:c="5"/>float32 <text:s text:c="5"/>cardboard <text:s text:c="3"/>62.1% ✓ <text:s text:c="5"/>16K <text:s text:c="6"/>Yes 23fps</text:span></text:p>
            <text:p text:style-name="P6"><text:span text:style-name="T6">2 dynamic-range <text:s text:c="7"/>float32 <text:s text:c="5"/>float32 <text:s text:c="5"/>cardboard <text:s text:c="3"/>62.1% ✓ <text:s text:c="5"/>16K <text:s text:c="6"/>Yes 23fps</text:span></text:p>
            <text:p text:style-name="P6"><text:span text:style-name="T6">3 float16 <text:s text:c="13"/>float32 <text:s text:c="5"/>float32 <text:s text:c="5"/>cardboard <text:s text:c="3"/>62.2% ✓ <text:s text:c="5"/>12K <text:s text:c="6"/>No</text:span></text:p>
            <text:p text:style-name="P6"><text:span text:style-name="T6">4 int8 float I/O <text:s text:c="6"/>float32 <text:s text:c="5"/>float32 <text:s text:c="5"/>cardboard <text:s text:c="3"/>64.5% ✓ <text:s text:c="5"/>12K <text:s text:c="6"/>No</text:span></text:p>
            <text:p text:style-name="P6"><text:span text:style-name="T6">5 int8 strict I/O <text:s text:c="5"/>int8 <text:s text:c="8"/>int8 <text:s text:c="8"/>cardboard <text:s text:c="3"/>62.9% ✓ <text:s text:c="5"/>12K <text:s text:c="6"/>N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Final Training vs Validation</text:p>
          </draw:text-box>
        </draw:frame>
        <draw:frame draw:style-name="gr2" draw:text-style-name="P5" draw:layer="layout" svg:width="27.999cm" svg:height="12.707cm" svg:x="0.054cm" svg:y="3.043cm">
          <draw:image xlink:href="Pictures/10000001000004C90000022C62E317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The can is recognized as cardboard</text:p>
          </draw:text-box>
        </draw:frame>
        <draw:frame draw:style-name="gr2" draw:text-style-name="P5" draw:layer="layout" svg:width="21.028cm" svg:height="12.882cm" svg:x="3.737cm" svg:y="2.868cm">
          <draw:image xlink:href="Pictures/10000001000005B00000037CC15B4D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Summary – What I learne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biggest learning for me was that the smaller model does not necessarily mean it will fit.</text:p>
              </text:list-item>
              <text:list-item>
                <text:p>Removing the pooling seems to have stuck the inference on cardboard, trash, sometimes metal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M Mono 12" svg:font-family="'LM Mono 12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1T19:36:13.261907879</meta:creation-date>
    <dc:date>2026-06-05T21:43:14.038153415</dc:date>
    <meta:editing-duration>PT21M17S</meta:editing-duration>
    <meta:editing-cycles>4</meta:editing-cycles>
    <meta:generator>LibreOffice/24.2.7.2$Linux_X86_64 LibreOffice_project/420$Build-2</meta:generator>
    <meta:document-statistic meta:object-count="73"/>
  </office:meta>
</office:document-meta>
</file>